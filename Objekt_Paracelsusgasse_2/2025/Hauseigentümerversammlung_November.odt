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P2" style:family="paragraph" style:parent-style-name="Standard">
      <style:text-properties fo:font-size="14pt" fo:font-weight="bold" officeooo:rsid="0014ca32" officeooo:paragraph-rsid="0014ca3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4ca32" officeooo:paragraph-rsid="0029451e" style:font-size-asian="14pt" style:font-weight-asian="bold" style:font-size-complex="14pt" style:font-weight-complex="bold"/>
    </style:style>
    <style:style style:name="P4" style:family="paragraph" style:parent-style-name="Text_20_body">
      <style:text-properties fo:font-size="14pt" fo:font-weight="bold" officeooo:paragraph-rsid="0014ca32" style:font-size-asian="14pt" style:font-size-complex="14pt"/>
    </style:style>
    <style:style style:name="P5" style:family="paragraph" style:parent-style-name="Text_20_body">
      <style:text-properties fo:font-size="14pt" fo:font-weight="bold" officeooo:paragraph-rsid="002bd0df" style:font-size-asian="14pt" style:font-size-complex="14pt"/>
    </style:style>
    <style:style style:name="P6" style:family="paragraph" style:parent-style-name="Text_20_body">
      <style:text-properties fo:font-size="14pt" fo:font-weight="bold" officeooo:paragraph-rsid="002c9c05" style:font-size-asian="14pt" style:font-size-complex="14pt"/>
    </style:style>
    <style:style style:name="P7" style:family="paragraph" style:parent-style-name="Text_20_body">
      <style:text-properties fo:font-size="14pt" fo:font-weight="bold" officeooo:paragraph-rsid="002ee250" style:font-size-asian="14pt" style:font-size-complex="14pt"/>
    </style:style>
    <style:style style:name="P8" style:family="paragraph" style:parent-style-name="Footer">
      <style:paragraph-properties fo:text-align="center" style:justify-single-word="false"/>
    </style:style>
    <style:style style:name="P9" style:family="paragraph" style:parent-style-name="Standard">
      <style:text-properties officeooo:rsid="0014ca32" officeooo:paragraph-rsid="0014ca32"/>
    </style:style>
    <style:style style:name="P10" style:family="paragraph" style:parent-style-name="Standard">
      <style:text-properties fo:font-weight="bold" officeooo:rsid="0014ca32" officeooo:paragraph-rsid="0014ca32" style:font-weight-asian="bold" style:font-weight-complex="bold"/>
    </style:style>
    <style:style style:name="P11" style:family="paragraph" style:parent-style-name="Standard">
      <style:text-properties fo:font-weight="bold" officeooo:rsid="001bf286" officeooo:paragraph-rsid="001bf286" style:font-weight-asian="bold" style:font-weight-complex="bold"/>
    </style:style>
    <style:style style:name="P12" style:family="paragraph" style:parent-style-name="Standard">
      <style:text-properties officeooo:rsid="0018a660" officeooo:paragraph-rsid="0018a660"/>
    </style:style>
    <style:style style:name="P13" style:family="paragraph" style:parent-style-name="Text_20_body">
      <style:text-properties officeooo:rsid="0018a660" officeooo:paragraph-rsid="0018a660"/>
    </style:style>
    <style:style style:name="P14" style:family="paragraph" style:parent-style-name="Standard">
      <style:text-properties officeooo:rsid="001c128e" officeooo:paragraph-rsid="001c128e"/>
    </style:style>
    <style:style style:name="P15" style:family="paragraph" style:parent-style-name="Standard">
      <style:text-properties officeooo:rsid="001fc7d0" officeooo:paragraph-rsid="001fc7d0"/>
    </style:style>
    <style:style style:name="P16" style:family="paragraph" style:parent-style-name="Standard">
      <style:text-properties officeooo:rsid="001fc7d0" officeooo:paragraph-rsid="0029451e"/>
    </style:style>
    <style:style style:name="P17" style:family="paragraph" style:parent-style-name="Text_20_body">
      <style:text-properties fo:font-weight="normal" officeooo:rsid="0018e238" officeooo:paragraph-rsid="0018e238" style:font-weight-asian="normal" style:font-weight-complex="normal"/>
    </style:style>
    <style:style style:name="P18" style:family="paragraph" style:parent-style-name="Text_20_body">
      <style:text-properties fo:font-weight="normal" officeooo:rsid="0018e238" officeooo:paragraph-rsid="002bd0df" style:font-weight-asian="normal" style:font-weight-complex="normal"/>
    </style:style>
    <style:style style:name="P19" style:family="paragraph" style:parent-style-name="Text_20_body">
      <style:text-properties fo:font-weight="normal" officeooo:rsid="0029451e" officeooo:paragraph-rsid="0029451e" style:font-weight-asian="normal" style:font-weight-complex="normal"/>
    </style:style>
    <style:style style:name="P20" style:family="paragraph" style:parent-style-name="Text_20_body">
      <style:text-properties fo:font-weight="normal" officeooo:rsid="001f37ee" officeooo:paragraph-rsid="002bd0df" style:font-weight-asian="normal" style:font-weight-complex="normal"/>
    </style:style>
    <style:style style:name="P21" style:family="paragraph" style:parent-style-name="Text_20_body">
      <style:text-properties fo:font-weight="normal" officeooo:rsid="001f37ee" officeooo:paragraph-rsid="002c9c05" style:font-weight-asian="normal" style:font-weight-complex="normal"/>
    </style:style>
    <style:style style:name="P22" style:family="paragraph" style:parent-style-name="Text_20_body">
      <style:text-properties fo:font-weight="normal" officeooo:rsid="001c128e" officeooo:paragraph-rsid="002c9c05" style:font-weight-asian="normal" style:font-weight-complex="normal"/>
    </style:style>
    <style:style style:name="P23" style:family="paragraph" style:parent-style-name="Text_20_body">
      <style:text-properties fo:font-weight="normal" officeooo:rsid="001c128e" officeooo:paragraph-rsid="002ee250" style:font-weight-asian="normal" style:font-weight-complex="normal"/>
    </style:style>
    <style:style style:name="P24" style:family="paragraph" style:parent-style-name="Text_20_body">
      <style:text-properties fo:font-weight="normal" officeooo:rsid="002ee250" officeooo:paragraph-rsid="002ee250" style:font-weight-asian="normal" style:font-weight-complex="normal"/>
    </style:style>
    <style:style style:name="P25" style:family="paragraph" style:parent-style-name="Text_20_body">
      <style:text-properties fo:font-weight="normal" officeooo:rsid="002fc85a" officeooo:paragraph-rsid="002fc85a" style:font-weight-asian="normal" style:font-weight-complex="normal"/>
    </style:style>
    <style:style style:name="P26" style:family="paragraph" style:parent-style-name="Standard">
      <style:text-properties officeooo:rsid="0029451e" officeooo:paragraph-rsid="0014ca32"/>
    </style:style>
    <style:style style:name="P27" style:family="paragraph" style:parent-style-name="Standard">
      <style:text-properties officeooo:rsid="00228275" officeooo:paragraph-rsid="001fc7d0"/>
    </style:style>
    <style:style style:name="P28" style:family="paragraph" style:parent-style-name="Standard">
      <style:text-properties officeooo:rsid="00228275" officeooo:paragraph-rsid="002bd0df"/>
    </style:style>
    <style:style style:name="P29" style:family="paragraph" style:parent-style-name="Standard">
      <style:text-properties officeooo:rsid="002ee250" officeooo:paragraph-rsid="002ee250"/>
    </style:style>
    <style:style style:name="P30" style:family="paragraph" style:parent-style-name="Standard">
      <style:text-properties officeooo:rsid="002fc85a" officeooo:paragraph-rsid="002fc85a"/>
    </style:style>
    <style:style style:name="P31" style:family="paragraph" style:parent-style-name="Standard">
      <style:text-properties officeooo:rsid="001f706a" officeooo:paragraph-rsid="002fc85a"/>
    </style:style>
    <style:style style:name="P32" style:family="paragraph" style:parent-style-name="Text_20_body">
      <style:text-properties officeooo:paragraph-rsid="0018e238"/>
    </style:style>
    <style:style style:name="P33" style:family="paragraph" style:parent-style-name="Text_20_body">
      <style:text-properties officeooo:paragraph-rsid="0014ca32"/>
    </style:style>
    <style:style style:name="P34" style:family="paragraph" style:parent-style-name="Text_20_body">
      <style:text-properties officeooo:paragraph-rsid="0019eed5"/>
    </style:style>
    <style:style style:name="P35" style:family="paragraph" style:parent-style-name="Standard" style:list-style-name="L1">
      <style:text-properties officeooo:rsid="001859cf" officeooo:paragraph-rsid="001859cf"/>
    </style:style>
    <style:style style:name="P36" style:family="paragraph" style:parent-style-name="Standard" style:list-style-name="L1">
      <style:text-properties officeooo:rsid="0018a660" officeooo:paragraph-rsid="0018a660"/>
    </style:style>
    <style:style style:name="P37" style:family="paragraph" style:parent-style-name="Standard" style:list-style-name="L1">
      <style:text-properties officeooo:rsid="00252fa2" officeooo:paragraph-rsid="00252fa2"/>
    </style:style>
    <style:style style:name="P38" style:family="paragraph" style:parent-style-name="Standard">
      <style:paragraph-properties fo:text-align="center" style:justify-single-word="false"/>
      <style:text-properties fo:font-size="24pt" fo:font-weight="bold" officeooo:rsid="0014ca32" officeooo:paragraph-rsid="0029451e" style:font-size-asian="24pt" style:font-weight-asian="bold" style:font-size-complex="24pt" style:font-weight-complex="bold"/>
    </style:style>
    <style:style style:name="P39" style:family="paragraph" style:parent-style-name="Standard">
      <style:paragraph-properties fo:text-align="center" style:justify-single-word="false"/>
      <style:text-properties fo:font-size="24pt" fo:font-weight="bold" officeooo:rsid="0032cb6b" officeooo:paragraph-rsid="0032cb6b" style:font-size-asian="24pt" style:font-weight-asian="bold" style:font-size-complex="24pt" style:font-weight-complex="bold"/>
    </style:style>
    <style:style style:name="P40" style:family="paragraph" style:parent-style-name="Text_20_body">
      <style:text-properties fo:font-size="14pt" fo:font-weight="bold" officeooo:rsid="0029451e" officeooo:paragraph-rsid="0029451e" style:font-size-asian="14pt" style:font-size-complex="14pt"/>
    </style:style>
    <style:style style:name="P41" style:family="paragraph" style:parent-style-name="Text_20_body">
      <style:text-properties fo:font-size="14pt" fo:font-weight="bold" officeooo:paragraph-rsid="0014ca32"/>
    </style:style>
    <style:style style:name="P42" style:family="paragraph" style:parent-style-name="Text_20_body" style:list-style-name="L2"/>
    <style:style style:name="P43" style:family="paragraph" style:parent-style-name="Text_20_body" style:list-style-name="L2">
      <style:text-properties officeooo:paragraph-rsid="0029451e"/>
    </style:style>
    <style:style style:name="P44" style:family="paragraph" style:parent-style-name="Text_20_body" style:list-style-name="L2">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9c05"/>
    </style:style>
    <style:style style:name="T4" style:family="text">
      <style:text-properties officeooo:rsid="001859cf"/>
    </style:style>
    <style:style style:name="T5" style:family="text">
      <style:text-properties officeooo:rsid="0018e238"/>
    </style:style>
    <style:style style:name="T6" style:family="text">
      <style:text-properties officeooo:rsid="001adc25"/>
    </style:style>
    <style:style style:name="T7" style:family="text">
      <style:text-properties officeooo:rsid="001fc7d0"/>
    </style:style>
    <style:style style:name="T8" style:family="text">
      <style:text-properties officeooo:rsid="00252fa2"/>
    </style:style>
    <style:style style:name="T9" style:family="text">
      <style:text-properties officeooo:rsid="0029451e"/>
    </style:style>
    <style:style style:name="T10" style:family="text">
      <style:text-properties fo:font-size="14pt" fo:font-weight="bold" officeooo:rsid="0014ca32" style:font-size-asian="14pt" style:font-size-complex="14pt"/>
    </style:style>
    <style:style style:name="T11" style:family="text">
      <style:text-properties fo:font-size="14pt" fo:font-weight="bold" officeooo:rsid="002bd0df" style:font-size-asian="14pt" style:font-size-complex="14pt"/>
    </style:style>
    <style:style style:name="T12" style:family="text">
      <style:text-properties fo:font-weight="normal" officeooo:rsid="00197c22" style:font-weight-asian="normal" style:font-weight-complex="normal"/>
    </style:style>
    <style:style style:name="T13" style:family="text">
      <style:text-properties fo:font-weight="normal" officeooo:rsid="001c128e" style:font-weight-asian="normal" style:font-weight-complex="normal"/>
    </style:style>
    <style:style style:name="T14" style:family="text">
      <style:text-properties fo:font-weight="normal" officeooo:rsid="0019eed5" style:font-weight-asian="normal" style:font-weight-complex="normal"/>
    </style:style>
    <style:style style:name="T15" style:family="text">
      <style:text-properties fo:font-weight="normal" officeooo:rsid="002c9c05" style:font-weight-asian="normal" style:font-weight-complex="normal"/>
    </style:style>
    <style:style style:name="T16" style:family="text">
      <style:text-properties fo:font-weight="normal" officeooo:rsid="002ee250" style:font-weight-asian="normal" style:font-weight-complex="normal"/>
    </style:style>
    <style:style style:name="T17" style:family="text">
      <style:text-properties fo:font-size="12pt" fo:font-weight="normal" officeooo:rsid="0029451e" style:font-size-asian="12pt" style:font-weight-asian="normal" style:font-size-complex="12pt" style:font-weight-complex="normal"/>
    </style:style>
    <style:style style:name="T18" style:family="text">
      <style:text-properties fo:font-size="12pt" fo:font-weight="bold" officeooo:rsid="0029451e" style:font-size-asian="12pt" style:font-weight-asian="normal" style:font-size-complex="12pt" style:font-weight-complex="normal"/>
    </style:style>
    <style:style style:name="T19" style:family="text">
      <style:text-properties officeooo:rsid="002a5eef"/>
    </style:style>
    <style:style style:name="T20" style:family="text">
      <style:text-properties officeooo:rsid="002bd0df"/>
    </style:style>
    <style:style style:name="T21" style:family="text">
      <style:text-properties officeooo:rsid="002c9c05"/>
    </style:style>
    <style:style style:name="T22" style:family="text">
      <style:text-properties officeooo:rsid="002da4c8"/>
    </style:style>
    <style:style style:name="T23" style:family="text">
      <style:text-properties officeooo:rsid="002ee250"/>
    </style:style>
    <style:style style:name="T24" style:family="text">
      <style:text-properties officeooo:rsid="002fc8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9">Protokoll der ordentlichen </text:span>Hauseigentümerversammlung </text:p>
      <text:p text:style-name="P38"/>
      <text:p text:style-name="P39">NUTZWERTGUTACHTEN</text:p>
      <text:p text:style-name="P3"/>
      <text:p text:style-name="P2">Anwesende <text:span text:style-name="T4">Hauseigentümerinnen und Hauseigentümer</text:span>:</text:p>
      <text:p text:style-name="P10"/>
      <text:list text:style-name="L1">
        <text:list-item>
          <text:p text:style-name="P35">Dr. Neumeister Peter</text:p>
        </text:list-item>
        <text:list-item>
          <text:p text:style-name="P36">Fr. Adamek <text:span text:style-name="T8">Veronika und Stephan</text:span></text:p>
        </text:list-item>
        <text:list-item>
          <text:p text:style-name="P37">Dr. Birk Steffen</text:p>
        </text:list-item>
        <text:list-item>
          <text:p text:style-name="P37">Fr. Tanil Johanna</text:p>
        </text:list-item>
        <text:list-item>
          <text:p text:style-name="P36">Fr. Girtler Eveline</text:p>
        </text:list-item>
        <text:list-item>
          <text:p text:style-name="P37">Univ. Prof. Dr. Roller-Wirnsberger</text:p>
        </text:list-item>
        <text:list-item>
          <text:p text:style-name="P37">Mag. (FH) Brunnader Anita</text:p>
        </text:list-item>
        <text:list-item>
          <text:p text:style-name="P37">Johanna Kramer-Schöggl, BA</text:p>
        </text:list-item>
      </text:list>
      <text:p text:style-name="P12"/>
      <text:p text:style-name="P12">entsprechend <text:span text:style-name="T8">64,57</text:span>% der Eigentumsanteile.</text:p>
      <text:p text:style-name="P26"/>
      <text:p text:style-name="P26"/>
      <text:p text:style-name="P40">Tagesordnungspunkte: </text:p>
      <text:list text:style-name="L2">
        <text:list-item>
          <text:p text:style-name="P43"><text:span text:style-name="T18">Status Fenstertausch:</text:span><text:span text:style-name="T17"> Aktueller Stand und weiteres Vorgehen.</text:span></text:p>
        </text:list-item>
        <text:list-item>
          <text:p text:style-name="P42"><text:span text:style-name="T1">Rücklagen &amp; Finanzverwaltung:</text:span> <text:span text:style-name="T9">D</text:span>ringenden Klärungsbedarf bezüglich unklarer Ausgaben seitens der Hausverwaltung für "Elektroinstallationen"</text:p>
        </text:list-item>
        <text:list-item>
          <text:p text:style-name="P42"><text:span text:style-name="T1">Wasseraustritt im Keller:</text:span> Bericht über den kürzlich entdeckten Wasseraustritt/Rohrbruch.</text:p>
        </text:list-item>
        <text:list-item>
          <text:p text:style-name="P42"><text:span text:style-name="T1">Feuchtigkeitsprobleme </text:span><text:span text:style-name="T3">am Dachstuhl</text:span><text:span text:style-name="T1">: </text:span><text:span text:style-name="T15">Bericht über Feuchte bereiche des Dachstuhls</text:span></text:p>
        </text:list-item>
        <text:list-item>
          <text:p text:style-name="P42"><text:span text:style-name="T1">Sicherheit/Haustüre: </text:span>Leider kam es im Haus zu Paket-Diebstählen</text:p>
        </text:list-item>
        <text:list-item>
          <text:p text:style-name="P42"><text:span text:style-name="T1">Gegensprechanlage:</text:span> Funktioniert alles?</text:p>
        </text:list-item>
        <text:list-item>
          <text:p text:style-name="P43"><text:span text:style-name="T1">Status Heizleistung:</text:span> Bestandsaufnahme der aktuellen Probleme im Haus.</text:p>
        </text:list-item>
        <text:list-item>
          <text:p text:style-name="P44">Reinigung/Garten/Winterdienst:</text:p>
        </text:list-item>
        <text:list-item>
          <text:p text:style-name="P43"><text:span text:style-name="T2">Hausverwaltung:</text:span> Diskussion über die aktuelle Zufriedenheit und mögliche Alternativen zur Seria.</text:p>
        </text:list-item>
        <text:list-item>
          <text:p text:style-name="P43"><text:soft-page-break/><text:span text:style-name="T1">Kommunikation:</text:span> Einigung auf einen einfachen, digitalen Informationskanal für uns Eigentümer (z.B. für schnelle Abstimmungen, Terminfindung)</text:p>
        </text:list-item>
        <text:list-item>
          <text:p text:style-name="P42"><text:span text:style-name="T1">Sonstiges / Allfälliges </text:span>Raum für Themen, die andere Eigentümer einbringen möchten.</text:p>
        </text:list-item>
      </text:list>
      <text:p text:style-name="P19"/>
      <text:p text:style-name="P33"><text:span text:style-name="T11">1) </text:span><text:span text:style-name="T10">Status Fenstertausch:</text:span></text:p>
      <text:p text:style-name="P13"><text:span text:style-name="T19">Laut aktueller Information seitens der Firma welche den Fenstertausch durchführen wird (eingeholt von Frau Johanna Kramer-Schöggl), wird mit diesem</text:span> <text:span text:style-name="T19">m</text:span>itte Jänner <text:span text:style-name="T19">begonnen werden</text:span>. Je Wohneinheit <text:span text:style-name="T19">wird</text:span> dies ca. 2 bis maximal 4 Tage (für die größeren Wohnungen) dauern. Das <text:span text:style-name="T19">derzeitige </text:span>Angebot ist laut <text:span text:style-name="T19">aktuellen Informationen von </text:span>Herrn <text:span text:style-name="T19">Stefan </text:span>Adamek um ca. 1/3 günstiger <text:span text:style-name="T19">als das ursprüngliche Angebot.</text:span> <text:span text:style-name="T19">Aus heutig Sicht wird es ab 2026 wieder eine </text:span>Förderung <text:span text:style-name="T19">geben</text:span>, welche im Nachhinein <text:span text:style-name="T19">von der Hausverwaltung</text:span> <text:span text:style-name="T19">(nach endgültiger Rechnungsstellung) </text:span>eingereicht <text:span text:style-name="T19">werden muss</text:span>. <text:span text:style-name="T19">Diesbezüglich gibt es noch keine endgültige Information von Herrn Mayer,</text:span> wie mit den <text:span text:style-name="T19">Fördergeldern</text:span> <text:span text:style-name="T19">verfahren werden </text:span>wird (direkte Auszahlung <text:span text:style-name="T19">and die Eigentümer oder</text:span> <text:span text:style-name="T5">Einzahlung in die Rücklagen).</text:span></text:p>
      <text:p text:style-name="P32"><text:span text:style-name="T19">Ein </text:span><text:span text:style-name="T5">Handwerkerbonus muss, </text:span><text:span text:style-name="T19">so gewünscht, von den Hauseigentümerinnen und Hauseigentümern</text:span><text:span text:style-name="T5"> selbst eingereicht werden. </text:span><text:span text:style-name="T19">Die Firma welche den Fenstertausch durchführt wird voraussichtlich keine Mal- und Anstricharbeiten übernehmen.</text:span></text:p>
      <text:p text:style-name="P28">Herr <text:span text:style-name="T20">Ste</text:span><text:span text:style-name="T21">ph</text:span><text:span text:style-name="T20">an </text:span>Adamek regt noch an die Zahlung der Fenster erst zu genehmigen, wenn der Fenstertausch korrekt durchgeführt wurde und zwar von jeder Partei nach jedem Fenstertausch. Erst danach soll Herr Mayer die Zahlung genehmigen.</text:p>
      <text:p text:style-name="P28"/>
      <text:p text:style-name="P5"><text:span text:style-name="T20">2) </text:span>Rücklagen &amp; Finanzverwaltung:</text:p>
      <text:p text:style-name="P18"><text:span text:style-name="T20">Es ergeht die </text:span>Information an alle Eigentümer<text:span text:style-name="T20">innen und Eigentümer</text:span>: <text:span text:style-name="T20">Auf Nachfrage von Frau Kramer-Schöggl sind l</text:span>aut Herrn Mayer die Rücklagen seit der ersten Berechnung <text:span text:style-name="T20">der Kosten für den Fenstertausch </text:span>zurückgegangen. <text:span text:style-name="T20">D</text:span>ies, <text:span text:style-name="T20">dei</text:span> aufgrund von „Elektroinsta<text:span text:style-name="T6">l</text:span>lationen“ notwendig gewesen und mache ca. 10.000€ aus. <text:span text:style-name="T20">Es konnte jedoch nicht genau eruiert werden umd welche Installationen genau es sich dabei handeln soll. </text:span></text:p>
      <text:p text:style-name="P5"><text:span text:style-name="T20">3) </text:span>Wasseraustritt im Keller:</text:p>
      <text:p text:style-name="P20"><text:span text:style-name="T20">Es ergeht die </text:span><text:span text:style-name="T5">Information an alle Eigentümer</text:span><text:span text:style-name="T20">innen und Eigentümer</text:span><text:span text:style-name="T5">: </text:span><text:span text:style-name="T20">Am XXX kam es zu einem Wasser</text:span>austritt <text:span text:style-name="T20">aus einem Abflussrohr welches </text:span>im Kellerabteil der <text:span text:style-name="T20">Wohnung</text:span> 6 <text:span text:style-name="T20">aus der Decke kommt</text:span>. <text:span text:style-name="T20">Der Wasseraustritt wurde zeitnah von der Putzfrau entdeckt und gemeldet. Kurz danach kam es zu einem schnellen versiegen des Wasseraustritts. Seither kam es zu keinem weiteren Wasseraustritt an der selben Stelle. </text:span><text:span text:style-name="T21">Es kam zu einer Begutachtung durch </text:span>Herr<text:span text:style-name="T21">n</text:span> Weinhandl <text:span text:style-name="T21">welcher </text:span><text:soft-page-break/><text:span text:style-name="T21">keine Ursache festestellen konnte, auch in den Wohnungen konnte kein Wasserschaden festegestellt werden.</text:span></text:p>
      <text:p text:style-name="P6"><text:span text:style-name="T21">4) </text:span>Feuchtigkeitsprobleme <text:span text:style-name="T21">am Dachstuhl</text:span>:</text:p>
      <text:p text:style-name="P21"><text:span text:style-name="T20">Es ergeht die </text:span><text:span text:style-name="T5">Information an alle Eigentümer</text:span><text:span text:style-name="T20">innen und Eigentümer</text:span><text:span text:style-name="T5">: </text:span><text:span text:style-name="T21">Laut </text:span>Clara Roller <text:span text:style-name="T21">(Wohnhaft in Wohnung Nr. 11) kam es</text:span> an der <text:span text:style-name="T21">nordseitigen</text:span> Kante des Dachstuhl<text:span text:style-name="T21">s</text:span>, <text:span text:style-name="T21">zu einem Wasserschaden. Der b</text:span>eauftragte<text:span text:style-name="T21">r</text:span> Gutachter <text:span text:style-name="T21">konnte </text:span>aufgrund der Witterungslage <text:span text:style-name="T21">Aussage bezüglich der Ursache machen</text:span>, <text:span text:style-name="T21">wesewegen </text:span>er <text:span text:style-name="T21">zu geeigenter Zeit wiederkommen werde um das Gutachten erstellen zu können</text:span>.</text:p>
      <text:p text:style-name="P6"><text:span text:style-name="T21">5) </text:span>Sicherheit/Haustüre:</text:p>
      <text:p text:style-name="P22">Die Hauseigentümer wurde gebeten, die Mieter zu informieren, dass es zum Diebstal von Postsendungen kam und dass diese im eigenen Interesse die Tür nicht dauerhaft feststellen sollen.</text:p>
      <text:p text:style-name="P6"><text:span text:style-name="T21">6) </text:span>Gegensprechanlage:</text:p>
      <text:p text:style-name="P21"><text:span text:style-name="T21">Die Gegensprechanlage der Wohnung Nr. 6 funktioniert bereits sei geraumer Zeit nicht. Diese wird aber ohnehin nicht genutzt. </text:span>Keiner der Anwesenden kann sagen, ob es bei den Untermietern Probleme mit dieser g<text:span text:style-name="T21">äbe</text:span>. <text:span text:style-name="T21">Aufgrunddessen wird dieser Punkt als abgeschlossen betrachtet.</text:span></text:p>
      <text:p text:style-name="P4"><text:span text:style-name="T21">7) </text:span>Status Heizleistung:</text:p>
      <text:p text:style-name="P22"><text:span text:style-name="T21">Wie bekannt teilen sich die Siedlung und das Objekt Paracelusgasse 2 den Heizkessel. Dieser musst vor kurzem (am XXX) augrund von Rostschäden erneuert bzw. ausgetauscht werden. Laut Frau Adamekt kam es zunächst zu einem</text:span> täglich<text:span text:style-name="T21">en</text:span> <text:span text:style-name="T21">Verlust von fast </text:span>100L Wasser pro Tag. <text:span text:style-name="T21">Dieser wurde von </text:span>Gerd Bernhard, <text:span text:style-name="T21">ersetzt. Mittlerweile müsse dies</text:span> nur noch 1x in der Woche <text:span text:style-name="T21">erfolgen.</text:span> <text:span text:style-name="T21">Eine genaue Lokalisation der undichten Stelle konnte bisher nicht erfolgen. Seitens der beauftragten Firma hieß es, dass eine Identifikation nur bei Schneelage möglich sei. Im undichten Bereich würde dann der Schnee schmelzen. </text:span>Es wird in Absprache mit der Interessensgemeinschaft der Paracelsussiedlung, weiterhin versucht <text:span text:style-name="T22">die Lokalisation der Leckage zu identifizieren, da dies zu mehrkosten für die gesamte Siedlung führt.</text:span></text:p>
      <text:p text:style-name="P7"><text:span text:style-name="T23">8) </text:span>Reinigung/Garten/Winterdienst:</text:p>
      <text:p text:style-name="P23">Die Wartung des Garten soll <text:span text:style-name="T23">fortan </text:span>vereinheitlicht werden, mit <text:span text:style-name="T23">vorgeplanten </text:span><text:span text:style-name="T7">Zeiten für Grünschnitt etc. </text:span><text:span text:style-name="T23">Die Planung dieser Vereinheitlichung wird von Frau Kramer-Schöggl erarbeitet und der Hausverwaltung zur durchführung übergeben</text:span></text:p>
      <text:p text:style-name="P24">Phasenweise wurde der Winterdienst (Räumung der Siedlungszugehörigen Straßen) nicht ordnungsgemäßt bzw. garnicht durchgeführt. Herr Stephan Adamek informiert diesbezüglich, dass in der Abrechnung der Hausverwaltung der Winterräumdienst ein eigener Posten sei und somit die Haftung bei Nichtdurchführung bei dieser liege.</text:p>
      <text:p text:style-name="P4"><text:soft-page-break/><text:span text:style-name="T22">9) </text:span>Hausverwaltung:</text:p>
      <text:p text:style-name="P34"><text:span text:style-name="T12">Aufgrund </text:span><text:span text:style-name="T16">sich häufender Probleme mit der</text:span><text:span text:style-name="T12"> Hausverwaltung </text:span><text:span text:style-name="T16">(undurchsichtige Rechnungslegung, prothardierte Durchführung vorgeschriebener Maßnahmen etc.) </text:span><text:span text:style-name="T12">wurde angeregt, die Hausverwaltung zu wechseln. </text:span><text:span text:style-name="T13">Dieses Ansuchen wurde </text:span><text:span text:style-name="T16">von allen Anwesenden </text:span><text:span text:style-name="T13">einstimmig angenommen.</text:span><text:span text:style-name="T12"><text:line-break/></text:span><text:span text:style-name="T14">Weitere Gründe, die Hausverwaltung zu wechseln wären: </text:span><text:span text:style-name="T16">Die Möglichkeit</text:span><text:span text:style-name="T14"> ein einheitlicheres Vorgehen </text:span><text:span text:style-name="T16">für die</text:span><text:span text:style-name="T14"> ganzen Siedlung </text:span><text:span text:style-name="T16">Paracelsusgasse</text:span><text:span text:style-name="T14"> insbesondere, wenn die Firma Lanser dafür beauftragt wurde </text:span><text:span text:style-name="T16">(Diese ist derzeit von der Interessensgemeinschaft der Siedlung für die Verwaltung beauftragt)</text:span><text:span text:style-name="T14">. </text:span><text:span text:style-name="T16">Die Arbeite der Firma </text:span><text:span text:style-name="T12">Lanser wird einhellig als zufriedenstellen beschrieben (a</text:span><text:span text:style-name="T16">nhand der</text:span><text:span text:style-name="T12"> Erfahrungen der anwesenden Eigentümer</text:span><text:span text:style-name="T16">innen und Eigentümer, welche ebenfalls Besitzer</text:span><text:span text:style-name="T12"> </text:span><text:span text:style-name="T16">eines der </text:span><text:span text:style-name="T12">Reihenhäuser </text:span><text:span text:style-name="T16">der</text:span><text:span text:style-name="T12"> Siedlung </text:span><text:span text:style-name="T16">Paracelsusgasse sind</text:span><text:span text:style-name="T12">)<text:line-break/></text:span><text:span text:style-name="T16">Diesbezüglich wird Frau Kramer-Schöggel einen</text:span><text:span text:style-name="T13"> Aufgabenkatalog </text:span><text:span text:style-name="T16">erstellen</text:span><text:span text:style-name="T13"> </text:span><text:span text:style-name="T16">und diesen and mindestens drei unterschiedliche Hausverwaltungen senden und deren Anbote einholen.</text:span></text:p>
      <text:p text:style-name="P4">Kommunikation:</text:p>
      <text:p text:style-name="P25">Künftige Eigentümerversammlungen sollen halbjährlich erfolgen und werden über ein geeignetes Online-Tool organisiert werden. Für künftige Abstimmunge soll das gleiche gelten. Die Auswahl dieses Tools soll DSGVO konform erfolgen.</text:p>
      <text:p text:style-name="P17"><text:span text:style-name="T24">B</text:span>ei allen künftigen Email-<text:span text:style-name="T6">K</text:span>onversationen <text:span text:style-name="T24">mit der Hausverwaltung</text:span>, <text:span text:style-name="T24">werden </text:span>alle Eigentümer ins <text:span text:style-name="T24">CC</text:span> genommen, <text:span text:style-name="T24">so dass stets alle über den aktuellen Stand informiert sind</text:span>.</text:p>
      <text:p text:style-name="P41">Sonstiges / Allfälliges:</text:p>
      <text:p text:style-name="P11">Wahl einer Hauseigentümervertretung: </text:p>
      <text:p text:style-name="P29">Es wurde Angeregt eine Hauseigentümervertretung zu wählen, damit die künftige Kommunikation mit der Hausverwaltung über eine gemeinsame Schnitstelle und einheitlich vollzogen werden kann.</text:p>
      <text:p text:style-name="P14"><text:span text:style-name="T23">1. Frau </text:span>Johanna Kramer-Schöggl <text:span text:style-name="T23">wurde </text:span>einstimmige <text:span text:style-name="T23">zur Hauseigentümervertretering gewählt</text:span></text:p>
      <text:p text:style-name="P14"><text:span text:style-name="T23">2. Frau </text:span>Clara Roller <text:span text:style-name="T23">wurde </text:span>einstimmig <text:span text:style-name="T23">zur</text:span> Stellvertr<text:span text:style-name="T24">eterin gewählt</text:span></text:p>
      <text:p text:style-name="P30">Beide haben die Wahl angenommen.</text:p>
      <text:p text:style-name="P30"/>
      <text:p text:style-name="P31">Herr Mayer <text:span text:style-name="T24">wird</text:span> <text:span text:style-name="T24">über die bei dieser Hausversammlung besprochenen Dinge</text:span> informiert werden, <text:span text:style-name="T24">insbesondere, dass Frau </text:span>Johanna <text:span text:style-name="T24">Kramer-Schöggl</text:span> Haussprecherin gewählt wurde und alle künftige <text:span text:style-name="T24">Kommunikation einheitlich</text:span> über sie laufen soll.</text:p>
      <text:p text:style-name="P31"/>
      <text:p text:style-name="P31"><text:s/></text:p>
      <text:p text:style-name="P15"><text:span text:style-name="T24">Frau Adamek regt an, den u</text:span>nebene<text:span text:style-name="T24">n</text:span> Weg <text:span text:style-name="T24">welcher von der Einfahrt der Siedlung zur gemeinschaftlichen Grünfläche des Objekts Nr. 2 führt, ein zu ebnen, und ggf. mit Platten zu befestigen um die Sturzgefahr zu reduzieren</text:span>. <text:span text:style-name="T24">Ob und ggf. wie dies zu erfolgen hat wird noch abgestimmt werden.</text:span></text:p>
      <text:p text:style-name="P15"/>
      <text:p text:style-name="P15"><text:soft-page-break/><text:span text:style-name="T24">Frau Johanna Kramer-Schöggl hat bereits vor längerem angeregt die südseitig gelegenen Fichten zu kürzen. Die von Frau Adamek diesbezüglich angefragte Firma kon</text:span>n<text:span text:style-name="T24">te diese arbeiten allerdings nicht durchführe.</text:span> Herr <text:span text:style-name="T24">Birk hat sich bereit erklärt, einen Bekannten, welcher sich auf die Kürzung von hohen Bäumen spezialisiert hat zu fragen, ob er diese Arbeit erledigen woll/könne.</text:span></text:p>
      <text:p text:style-name="P27"/>
      <text:p text:style-name="P9"/>
      <text:p text:style-name="P12">Tamino.gv.at</text:p>
      <text:p text:style-name="P12"/>
      <text:p text:style-name="P16">Falls die nicht anwesenden Eigentümer noch Interesse daran haben sollten können diese ihre Stimme noch per Mail bekannt geb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
        <text:p text:style-name="MP1">Liegenschaft: <text:tab/><text:tab/><text:tab/>Paracelsusgasse 2, Graz 8010</text:p>
        <text:p text:style-name="MP1">Ort der Versammlung: <text:tab/><text:tab/>3 Goldene Kugeln, Riesplatz 1, Graz 8010</text:p>
        <text:p text:style-name="MP1">Datum und Uhrzeit: <text:tab/><text:tab/>26. November 2025 ab 18:00</text:p>
        <text:p text:style-name="MP1">-------------------------------------------------------------------------------------------------------</text:p>
      </style:header>
      <style:footer>
        <text:p text:style-name="MP2"><text:bookmark-start text:name="PageNumWizard_FOOTER_Default Page Style1 Copy 1"/><text:page-number text:select-page="current">5</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0:38:58.943361753</meta:creation-date>
    <dc:date>2026-02-11T16:18:24.517918763</dc:date>
    <meta:editing-duration>PT4H4M17S</meta:editing-duration>
    <meta:editing-cycles>19</meta:editing-cycles>
    <meta:generator>LibreOffice/24.2.7.2$Linux_X86_64 LibreOffice_project/420$Build-2</meta:generator>
    <meta:document-statistic meta:table-count="0" meta:image-count="0" meta:object-count="0" meta:page-count="5" meta:paragraph-count="66" meta:word-count="1184" meta:character-count="9072" meta:non-whitespace-character-count="7960"/>
  </office:meta>
</office:document-meta>
</file>