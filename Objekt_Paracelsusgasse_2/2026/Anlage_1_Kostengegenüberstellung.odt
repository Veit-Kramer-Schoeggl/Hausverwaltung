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772cm"/>
    </style:style>
    <style:style style:name="Table1.B" style:family="table-column">
      <style:table-column-properties style:column-width="4.867cm"/>
    </style:style>
    <style:style style:name="Table1.C" style:family="table-column">
      <style:table-column-properties style:column-width="5.362cm"/>
    </style:style>
    <style:style style:name="Table1.A1" style:family="table-cell">
      <style:table-cell-properties style:vertical-align="middle" fo:padding="0.049cm" fo:border="0.05pt solid #000000"/>
    </style:style>
    <style:style style:name="Table1.A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left" fo:keep-with-next="always"/>
    </style:style>
    <style:style style:name="Table2.A" style:family="table-column">
      <style:table-column-properties style:column-width="3.47cm"/>
    </style:style>
    <style:style style:name="Table2.B" style:family="table-column">
      <style:table-column-properties style:column-width="7.437cm"/>
    </style:style>
    <style:style style:name="Table2.C" style:family="table-column">
      <style:table-column-properties style:column-width="6.094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49cm" fo:border="0.05pt solid #000000"/>
    </style:style>
    <style:style style:name="P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officeooo:paragraph-rsid="0009097a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normal" style:font-weight-asian="normal" style:font-weight-complex="normal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normal" officeooo:paragraph-rsid="0009097a" style:font-weight-asian="normal" style:font-weight-complex="normal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style:font-name-asian="Google Sans Text" style:font-name-complex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officeooo:rsid="000a9ee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9097a"/>
    </style:style>
    <style:style style:name="T8" style:family="text">
      <style:text-properties officeooo:rsid="0009097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9097a" style:font-weight-asian="normal" style:font-weight-complex="normal"/>
    </style:style>
    <style:style style:name="T11" style:family="text">
      <style:text-properties officeooo:rsid="000a789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Kostenvergleich: Hypothetisches Jahr</text:h>
      <text:p text:style-name="Text_20_body">Um die Angebote vergleichbar zu machen, <text:span text:style-name="T8">wird ein Jahr angenommen</text:span>, in dem neben der Verwaltung auch eine <text:span text:style-name="T9">Sanierung/</text:span><text:span text:style-name="T10">Investition</text:span><text:span text:style-name="T9"> im Wert von € 20.000,</text:span><text:span text:style-name="T5">-</text:span> durchgeführt wird und <text:span text:style-name="T9">5 zusätzliche Arbeitsstunden </text:span>für Sonderwünsche anfallen. <text:span text:style-name="T11">Nutzfläche </text:span><text:span text:style-name="T9">886 m²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<text:span text:style-name="Strong_20_Emphasis"><text:span text:style-name="T1">Kostenpunkt (netto)</text:span></text:span></text:p>
            </table:table-cell>
            <table:table-cell table:style-name="Table1.A1" office:value-type="string">
              <text:p text:style-name="P2"><text:span text:style-name="Strong_20_Emphasis"><text:span text:style-name="T1">Rustler (Wien/Graz)</text:span></text:span></text:p>
            </table:table-cell>
            <table:table-cell table:style-name="Table1.A1" office:value-type="string">
              <text:p text:style-name="P2"><text:span text:style-name="Strong_20_Emphasis"><text:span text:style-name="T1">Wesiak (Graz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4">Pauschale Grundverwaltung</text:p>
          </table:table-cell>
          <table:table-cell table:style-name="Table1.A1" office:value-type="string">
            <text:p text:style-name="P1"><text:bookmark text:name="p-rc_cae4b8627272efa9-86"/>€ <text:span text:style-name="T1">4.000,00 </text:span><text:span text:style-name="T2"/></text:p>
          </table:table-cell>
          <table:table-cell table:style-name="Table1.A1" office:value-type="string">
            <text:p text:style-name="P1"><text:bookmark text:name="p-rc_cae4b8627272efa9-87"/>€ <text:span text:style-name="T1">3.960,00 (</text:span><text:span text:style-name="T4">basierend auf Nutzfläche</text:span><text:span text:style-name="T1">) </text:span></text:p>
          </table:table-cell>
        </table:table-row>
        <table:table-row>
          <table:table-cell table:style-name="Table1.A1" office:value-type="string">
            <text:p text:style-name="P4">Umsatzsteuererklärung (UVA)</text:p>
          </table:table-cell>
          <table:table-cell table:style-name="Table1.A1" office:value-type="string">
            <text:p text:style-name="P1"><text:bookmark text:name="p-rc_cae4b8627272efa9-88"/>€ <text:span text:style-name="T1">150,00 </text:span><text:span text:style-name="T2"/></text:p>
          </table:table-cell>
          <table:table-cell table:style-name="Table1.A1" office:value-type="string">
            <text:p text:style-name="P1"><text:bookmark text:name="p-rc_cae4b8627272efa9-89"/>€ <text:span text:style-name="T1">150,00 </text:span><text:span text:style-name="T2"/></text:p>
          </table:table-cell>
        </table:table-row>
        <table:table-row>
          <table:table-cell table:style-name="Table1.A1" office:value-type="string">
            <text:p text:style-name="P4">Notfallservice (RPS)</text:p>
          </table:table-cell>
          <table:table-cell table:style-name="Table1.A1" office:value-type="string">
            <text:p text:style-name="P1"><text:bookmark text:name="p-rc_cae4b8627272efa9-90"/>€ <text:span text:style-name="T1">510,34 (€ 0,048/m²/Mo) </text:span><text:span text:style-name="T2"/></text:p>
          </table:table-cell>
          <table:table-cell table:style-name="Table1.A1" office:value-type="string">
            <text:p text:style-name="P5">Inkludiert/Nicht extra gelistet</text:p>
          </table:table-cell>
        </table:table-row>
        <table:table-row>
          <table:table-cell table:style-name="Table1.A1" office:value-type="string">
            <text:p text:style-name="P4">Sanierungshonorar (bei € 20k)</text:p>
          </table:table-cell>
          <table:table-cell table:style-name="Table1.A1" office:value-type="string">
            <text:p text:style-name="P1"><text:bookmark text:name="p-rc_cae4b8627272efa9-91"/>€ <text:span text:style-name="T1">1.000,00 (5%) </text:span><text:span text:style-name="T2"/></text:p>
          </table:table-cell>
          <table:table-cell table:style-name="Table1.A1" office:value-type="string">
            <text:p text:style-name="P1"><text:bookmark text:name="p-rc_cae4b8627272efa9-92"/>€ <text:span text:style-name="T1">600,00 (3%) </text:span><text:span text:style-name="T2"/></text:p>
          </table:table-cell>
        </table:table-row>
        <table:table-row>
          <table:table-cell table:style-name="Table1.A1" office:value-type="string">
            <text:p text:style-name="P4">Zusatzaufwand (5 Std. Referent)</text:p>
          </table:table-cell>
          <table:table-cell table:style-name="Table1.A1" office:value-type="string">
            <text:p text:style-name="P1"><text:bookmark text:name="p-rc_cae4b8627272efa9-93"/>€ <text:span text:style-name="T1">800,00 (€ 160/Std.) </text:span><text:span text:style-name="T2"/></text:p>
          </table:table-cell>
          <table:table-cell table:style-name="Table1.A1" office:value-type="string">
            <text:p text:style-name="P1"><text:bookmark text:name="p-rc_cae4b8627272efa9-94"/>€ <text:span text:style-name="T1">500,00 (€ 100/Std.) </text:span><text:span text:style-name="T2"/></text:p>
          </table:table-cell>
        </table:table-row>
        <table:table-row>
          <table:table-cell table:style-name="Table1.A1" office:value-type="string">
            <text:p text:style-name="P4">Gesamtsumme (hypothetisch)</text:p>
          </table:table-cell>
          <table:table-cell table:style-name="Table1.A1" office:value-type="string">
            <text:p text:style-name="P1">€ <text:span text:style-name="T3">6.460,34</text:span></text:p>
          </table:table-cell>
          <table:table-cell table:style-name="Table1.A1" office:value-type="string">
            <text:p text:style-name="P3">€ <text:span text:style-name="T3">5.210,00</text:span></text:p>
          </table:table-cell>
        </table:table-row>
        <table:table-row>
          <table:table-cell table:style-name="Table1.A8" office:value-type="string">
            <text:p text:style-name="P7"><text:span text:style-name="T5">Gesamtsumme </text:span><text:span text:style-name="T7">(ohne Investition/Extraarbeit)</text:span> </text:p>
          </table:table-cell>
          <table:table-cell table:style-name="Table1.A8" office:value-type="string">
            <text:p text:style-name="P8">€ <text:span text:style-name="T5">4.660,34</text:span></text:p>
          </table:table-cell>
          <table:table-cell table:style-name="Table1.A8" office:value-type="string">
            <text:p text:style-name="P8">€ <text:span text:style-name="T5">4.110,42</text:span></text:p>
          </table:table-cell>
        </table:table-row>
      </table:table>
      <text:p text:style-name="Standard"/>
      <text:h text:style-name="Heading_20_3" text:outline-level="3">Gemeinsame Leistungen (Inkludiert)</text:h>
      <text:p text:style-name="Text_20_body">Beide Anbieter decken die gesetzlichen Standards ab:</text:p>
      <text:list text:style-name="L1">
        <text:list-item>
          <text:p text:style-name="P9"><text:bookmark text:name="p-rc_cae4b8627272efa9-122"/><text:span text:style-name="T5">Kaufmännisch:</text:span> Jahresabrechnung, Vorausschau, Mahnwesen, Buchführung, Rücklagenverwaltung.</text:p>
        </text:list-item>
        <text:list-item>
          <text:p text:style-name="P9"><text:bookmark text:name="p-rc_cae4b8627272efa9-123"/><text:span text:style-name="T5">Technisch:</text:span> Periodische Begehungen, Einholung von Kostenvoranschlägen (bei Rustler explizit ab € 2.000,- mindestens drei Angebote), Beauftragung von Handwerkern.</text:p>
        </text:list-item>
        <text:list-item>
          <text:p text:style-name="P9"><text:bookmark text:name="p-rc_cae4b8627272efa9-124"/><text:span text:style-name="T5">Rechtlich:</text:span> Vertretung vor Behörden, Einberufung der Eigentümerversammlung.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 table:protected="true">
              <text:p text:style-name="P2"><text:span text:style-name="Strong_20_Emphasis"><text:span text:style-name="T1">Feature</text:span></text:span></text:p>
            </table:table-cell>
            <table:table-cell table:style-name="Table2.A1" office:value-type="string" table:protected="true">
              <text:p text:style-name="P2"><text:span text:style-name="Strong_20_Emphasis"><text:span text:style-name="T1">Rustler</text:span></text:span></text:p>
            </table:table-cell>
            <table:table-cell table:style-name="Table2.A1" office:value-type="string" table:protected="true">
              <text:p text:style-name="P2"><text:span text:style-name="Strong_20_Emphasis"><text:span text:style-name="T1">Wesiak</text:span></text:span></text:p>
            </table:table-cell>
          </table:table-row>
        </table:table-header-rows>
        <table:table-row table:style-name="Table2.1">
          <table:table-cell table:style-name="Table2.A1" office:value-type="string" table:protected="true">
            <text:p text:style-name="P4">Digitalisierung</text:p>
          </table:table-cell>
          <table:table-cell table:style-name="Table2.A1" office:value-type="string" table:protected="true">
            <text:p text:style-name="P6"><text:bookmark text:name="p-rc_cae4b8627272efa9-98"/><text:span text:style-name="T5">Stark:</text:span> Online-Portal "Smart Manager" für Echtzeit-Abfragen.</text:p>
          </table:table-cell>
          <table:table-cell table:style-name="Table2.A1" office:value-type="string" table:protected="true">
            <text:p text:style-name="P6"><text:bookmark text:name="p-rc_cae4b8627272efa9-99"/>Standardmäßige Aktenführung.<text:span text:style-name="T2"/></text:p>
          </table:table-cell>
        </table:table-row>
        <table:table-row table:style-name="Table2.1">
          <table:table-cell table:style-name="Table2.A1" office:value-type="string" table:protected="true">
            <text:p text:style-name="P4">Erreichbarkeit</text:p>
          </table:table-cell>
          <table:table-cell table:style-name="Table2.A1" office:value-type="string" table:protected="true">
            <text:p text:style-name="P6"><text:bookmark text:name="p-rc_cae4b8627272efa9-100"/><text:span text:style-name="T5">24/7 Notfall-Service</text:span> (RPS) und Rückrufgarantie (max. nächster Werktag).</text:p>
          </table:table-cell>
          <table:table-cell table:style-name="Table2.A1" office:value-type="string" table:protected="true">
            <text:p text:style-name="P6"><text:bookmark text:name="p-rc_cae4b8627272efa9-101"/>Fokus auf persönlichen Hausverwalter vor Ort in Graz.<text:span text:style-name="T2"/></text:p>
          </table:table-cell>
        </table:table-row>
        <table:table-row table:style-name="Table2.1">
          <table:table-cell table:style-name="Table2.A1" office:value-type="string" table:protected="true">
            <text:p text:style-name="P4">Bauverwaltung</text:p>
          </table:table-cell>
          <table:table-cell table:style-name="Table2.A1" office:value-type="string" table:protected="true">
            <text:p text:style-name="P6"><text:bookmark text:name="p-rc_cae4b8627272efa9-102"/>Teurer (4–5% Honorar).<text:span text:style-name="T2"/></text:p>
          </table:table-cell>
          <table:table-cell table:style-name="Table2.A1" office:value-type="string" table:protected="true">
            <text:p text:style-name="P6"><text:bookmark text:name="p-rc_cae4b8627272efa9-103"/>Günstiger (3% Honorar).<text:span text:style-name="T2"/></text:p>
          </table:table-cell>
        </table:table-row>
        <text:soft-page-break/>
        <table:table-row table:style-name="Table2.1">
          <table:table-cell table:style-name="Table2.A1" office:value-type="string" table:protected="true">
            <text:p text:style-name="P4">Transparenz</text:p>
          </table:table-cell>
          <table:table-cell table:style-name="Table2.A1" office:value-type="string" table:protected="true">
            <text:p text:style-name="P6"><text:bookmark text:name="p-rc_cae4b8627272efa9-104"/>Sehr detaillierter Leistungskatalog im Vertrag .<text:span text:style-name="T2"/></text:p>
          </table:table-cell>
          <table:table-cell table:style-name="Table2.A1" office:value-type="string" table:protected="true">
            <text:p text:style-name="P6"><text:bookmark text:name="p-rc_cae4b8627272efa9-105"/>Kompakteres, eher klassisches Anbot .<text:span text:style-name="T2"/></text:p>
          </table:table-cell>
        </table:table-row>
        <table:table-row table:style-name="Table2.1">
          <table:table-cell table:style-name="Table2.A1" office:value-type="string" table:protected="true">
            <text:p text:style-name="P4">Konten</text:p>
          </table:table-cell>
          <table:table-cell table:style-name="Table2.A1" office:value-type="string" table:protected="true">
            <text:p text:style-name="P6"><text:bookmark text:name="p-rc_cae4b8627272efa9-106"/>Ein Anderkonto bei der Erste Bank.<text:span text:style-name="T2"/></text:p>
          </table:table-cell>
          <table:table-cell table:style-name="Table2.A1" office:value-type="string" table:protected="true">
            <text:p text:style-name="P6"><text:bookmark text:name="p-rc_cae4b8627272efa9-107"/>Zwei Eigenkonten (Hausverwaltung &amp; Rücklage).<text:span text:style-name="T2"/></text:p>
          </table:table-cell>
        </table:table-row>
      </table:table>
      <text:p text:style-name="Standard"/>
      <text:p text:style-name="Standard"/>
      <text:h text:style-name="Heading_20_2" text:outline-level="2">Kleingedruckte<text:span text:style-name="T8">s</text:span></text:h>
      <text:list text:style-name="L2">
        <text:list-item>
          <text:p text:style-name="P10"><text:bookmark text:name="p-rc_cae4b8627272efa9-108"/><text:span text:style-name="T5">Rustler "Auszugsgebühr":</text:span> Bei Beendigung des Vertrages verlangt Rustler ein Entgelt von bis zu <text:span text:style-name="T5">drei Monatshonoraren</text:span> für den Übergabeaufwand. Das ist eine Hürde beim Wechseln.</text:p>
        </text:list-item>
        <text:list-item>
          <text:p text:style-name="P10"><text:bookmark text:name="p-rc_cae4b8627272efa9-109"/><text:span text:style-name="T5">Wesiak Regionalität:</text:span> Wesiak sitzt direkt in der Stubenberggasse in Graz. Bei einer Liegenschaft in der Paracelsusgasse ist das quasi "um die Ecke", was für kurzfristige Begehungen ein Vorteil sein kann.</text:p>
        </text:list-item>
        <text:list-item>
          <text:p text:style-name="P11"><text:bookmark text:name="p-rc_cae4b8627272efa9-110"/><text:span text:style-name="T5">Wertsicherung:</text:span> Beide Verträge sind indexgesichert. Rustler passt zum 01.01.2027 das erste Mal an , Wesiak nutzt den VPI 2020 mit Basis Oktober 2025.</text:p>
        </text:list-item>
        <text:list-item>
          <text:p text:style-name="P10"><text:bookmark text:name="p-rc_cae4b8627272efa9-111"/><text:span text:style-name="T5">Heizkostenabrechnung:</text:span> Rustler weist explizit darauf hin, dass die Kosten für externe Ablesedienste (z.B. Techem, Ista) <text:span text:style-name="T5">nicht</text:span> im Honorar enthalten sind.</text:p>
        </text:list-item>
      </text:list>
      <text:p text:style-name="Text_20_body"><text:span text:style-name="T5">Zusammenfassend:</text:span> Wesiak ist preislich attraktiver, besonders bei den Stundensätzen und dem Bauverwaltungshonorar. Rustler punktet dafür mit einem sehr modernen Digital-Angebot und einer garantierten 24/7-Erreichbarkeit für Notfälle. <text:span text:style-name="T8">Die räumliche Nähe zur Liegenschaft ist jedoch auch was Notfälle betrift ein Bonus für Wesiak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1:19:16.678354618</meta:creation-date>
    <dc:date>2026-03-27T11:38:56.606128482</dc:date>
    <meta:editing-duration>PT14M1S</meta:editing-duration>
    <meta:editing-cycles>4</meta:editing-cycles>
    <meta:generator>LibreOffice/24.2.7.2$Linux_X86_64 LibreOffice_project/420$Build-2</meta:generator>
    <meta:document-statistic meta:table-count="2" meta:image-count="0" meta:object-count="0" meta:page-count="2" meta:paragraph-count="55" meta:word-count="355" meta:character-count="2702" meta:non-whitespace-character-count="2404"/>
  </office:meta>
</office:document-meta>
</file>