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ca94" officeooo:paragraph-rsid="001eca9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1eca94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f6f64"/>
    </style:style>
    <style:style style:name="P4" style:family="paragraph" style:parent-style-name="Standard">
      <style:text-properties style:font-name="Carlito" officeooo:rsid="001eca94" officeooo:paragraph-rsid="001eca94"/>
    </style:style>
    <style:style style:name="P5" style:family="paragraph" style:parent-style-name="Standard">
      <style:text-properties style:font-name="Carlito" fo:font-weight="normal" officeooo:rsid="001eca94" officeooo:paragraph-rsid="001eca9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1eca94" officeooo:paragraph-rsid="001eca94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1eca94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paragraph-rsid="0020d56f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paragraph-rsid="002577a7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paragraph-rsid="0028e642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29fcf3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officeooo:paragraph-rsid="00273929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officeooo:paragraph-rsid="0028e642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22d978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officeooo:paragraph-rsid="0028e642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1eca94"/>
    </style:style>
    <style:style style:name="T3" style:family="text">
      <style:text-properties style:font-name="Carlito" fo:font-weight="bold" style:font-weight-asian="bold" style:font-weight-complex="bold"/>
    </style:style>
    <style:style style:name="T4" style:family="text">
      <style:text-properties style:font-name="Carlito" fo:font-weight="bold" officeooo:rsid="00273929" style:font-weight-asian="bold" style:font-weight-complex="bold"/>
    </style:style>
    <style:style style:name="T5" style:family="text">
      <style:text-properties style:font-name="Carlito" fo:font-weight="bold" officeooo:rsid="001eca94" style:font-weight-asian="bold" style:font-weight-complex="bold"/>
    </style:style>
    <style:style style:name="T6" style:family="text">
      <style:text-properties style:font-name="Carlito" fo:font-weight="bold" officeooo:rsid="0028e642" style:font-weight-asian="bold" style:font-weight-complex="bold"/>
    </style:style>
    <style:style style:name="T7" style:family="text">
      <style:text-properties style:font-name="Carlito" fo:font-weight="bold" officeooo:rsid="0020d56f" style:font-weight-asian="bold" style:font-weight-complex="bold"/>
    </style:style>
    <style:style style:name="T8" style:family="text">
      <style:text-properties style:font-name="Carlito" fo:font-weight="bold" officeooo:rsid="0029fcf3" style:font-weight-asian="bold" style:font-weight-complex="bold"/>
    </style:style>
    <style:style style:name="T9" style:family="text">
      <style:text-properties style:font-name="Carlito" fo:font-weight="bold" officeooo:rsid="002b648e" style:font-weight-asian="bold" style:font-weight-complex="bold"/>
    </style:style>
    <style:style style:name="T10" style:family="text">
      <style:text-properties style:font-name="Carlito" fo:font-weight="normal" style:font-weight-asian="normal" style:font-weight-complex="normal"/>
    </style:style>
    <style:style style:name="T11" style:family="text">
      <style:text-properties style:font-name="Carlito" fo:font-weight="normal" officeooo:rsid="001eca94" style:font-weight-asian="normal" style:font-weight-complex="normal"/>
    </style:style>
    <style:style style:name="T12" style:family="text">
      <style:text-properties style:font-name="Carlito" fo:font-weight="normal" officeooo:rsid="002577a7" style:font-weight-asian="normal" style:font-weight-complex="normal"/>
    </style:style>
    <style:style style:name="T13" style:family="text">
      <style:text-properties style:font-name="Carlito" fo:font-weight="normal" officeooo:rsid="00273929" style:font-weight-asian="normal" style:font-weight-complex="normal"/>
    </style:style>
    <style:style style:name="T14" style:family="text">
      <style:text-properties style:font-name="Carlito" fo:font-weight="normal" officeooo:rsid="0022d978" style:font-weight-asian="normal" style:font-weight-complex="normal"/>
    </style:style>
    <style:style style:name="T15" style:family="text">
      <style:text-properties style:font-name="Carlito" fo:font-weight="normal" officeooo:rsid="0028e642" style:font-weight-asian="normal" style:font-weight-complex="normal"/>
    </style:style>
    <style:style style:name="T16" style:family="text">
      <style:text-properties style:font-name="Carlito" fo:font-weight="normal" officeooo:rsid="00245fb4" style:font-weight-asian="normal" style:font-weight-complex="normal"/>
    </style:style>
    <style:style style:name="T17" style:family="text">
      <style:text-properties style:font-name="Carlito" fo:font-weight="normal" officeooo:rsid="0020d56f" style:font-weight-asian="normal" style:font-weight-complex="normal"/>
    </style:style>
    <style:style style:name="T18" style:family="text">
      <style:text-properties style:font-name="Carlito" fo:font-weight="normal" officeooo:rsid="001f6f64" style:font-weight-asian="normal" style:font-weight-complex="normal"/>
    </style:style>
    <style:style style:name="T19" style:family="text">
      <style:text-properties style:font-name="Carlito" fo:font-weight="normal" officeooo:rsid="00292df9" style:font-weight-asian="normal" style:font-weight-complex="normal"/>
    </style:style>
    <style:style style:name="T20" style:family="text">
      <style:text-properties style:font-name="Carlito" fo:font-weight="normal" officeooo:rsid="0029fcf3" style:font-weight-asian="normal" style:font-weight-complex="normal"/>
    </style:style>
    <style:style style:name="T21" style:family="text">
      <style:text-properties style:font-name="Carlito" fo:font-weight="normal" officeooo:rsid="002b648e" style:font-weight-asian="normal" style:font-weight-complex="normal"/>
    </style:style>
    <style:style style:name="T22" style:family="text">
      <style:text-properties style:font-name="Carlito" fo:font-size="14pt" style:font-size-asian="14pt" style:font-size-complex="14pt"/>
    </style:style>
    <style:style style:name="T23" style:family="text">
      <style:text-properties style:text-position="sub 58%" style:font-name="Carlito" fo:font-weight="normal" officeooo:rsid="0020d56f" style:font-weight-asian="normal" style:font-weight-complex="normal"/>
    </style:style>
    <style:style style:name="T24" style:family="text">
      <style:text-properties style:text-position="sub 58%" style:font-name="Carlito" fo:font-weight="normal" officeooo:rsid="00273929" style:font-weight-asian="normal" style:font-weight-complex="normal"/>
    </style:style>
    <style:style style:name="T25" style:family="text">
      <style:text-properties style:text-position="sub 58%" style:font-name="Carlito" fo:font-weight="normal" officeooo:rsid="002b648e" style:font-weight-asian="normal" style:font-weight-complex="normal"/>
    </style:style>
    <style:style style:name="T26" style:family="text">
      <style:text-properties style:text-position="0% 100%" style:font-name="Carlito" fo:font-weight="normal" officeooo:rsid="0020d56f" style:font-weight-asian="normal" style:font-weight-complex="normal"/>
    </style:style>
    <style:style style:name="T27" style:family="text">
      <style:text-properties style:text-position="0% 100%" style:font-name="Carlito" fo:font-weight="normal" officeooo:rsid="00273929" style:font-weight-asian="normal" style:font-weight-complex="normal"/>
    </style:style>
    <style:style style:name="T28" style:family="text">
      <style:text-properties style:text-position="0% 100%" style:font-name="Carlito" fo:font-weight="normal" officeooo:rsid="002b648e" style:font-weight-asian="normal" style:font-weight-complex="normal"/>
    </style:style>
    <style:style style:name="T29" style:family="text">
      <style:text-properties style:text-position="0% 100%" style:font-name="Carlito" fo:font-weight="bold" officeooo:rsid="0020d56f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6"><text:span text:style-name="Strong_20_Emphasis"><text:span text:style-name="T22">Tagesordnung der ersten ordentlichen Hauseigetümerversamlung für das Jahr 2026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Zeit:</text:span></text:span><text:span text:style-name="T1"> 27.03.2026, ab 18:00<text:line-break/></text:span><text:span text:style-name="Strong_20_Emphasis"><text:span text:style-name="T1">Ort:</text:span></text:span><text:span text:style-name="T1"> Drei Goldenen Kugeln, Riesplatz 1, Graz 8010</text:span></text:p>
      <text:p text:style-name="P4"/>
      <text:list xml:id="list3337907078" text:style-name="L1">
        <text:list-item>
          <text:p text:style-name="P7"><text:span text:style-name="Strong_20_Emphasis"><text:span text:style-name="T3">Begrüßung, Bestellung eines Protokollführers</text:span></text:span></text:p>
        </text:list-item>
        <text:list-item>
          <text:p text:style-name="P12"><text:span text:style-name="Strong_20_Emphasis"><text:span text:style-name="T8">Danksagung:</text:span></text:span><text:span text:style-name="Strong_20_Emphasis"><text:span text:style-name="T20"> für die Gute bisherige </text:span></text:span><text:span text:style-name="Strong_20_Emphasis"><text:span text:style-name="T21">Z</text:span></text:span><text:span text:style-name="Strong_20_Emphasis"><text:span text:style-name="T20">usammenarbeit und Unterstützung, besonders hervorzuheben sind dabei die Beiträge von Herrn Birk bzgl. des Postschließfachs, </text:span></text:span><text:span text:style-name="Strong_20_Emphasis"><text:span text:style-name="T21">von </text:span></text:span><text:span text:style-name="Strong_20_Emphasis"><text:span text:style-name="T20">Clara für ihre </text:span></text:span><text:span text:style-name="Strong_20_Emphasis"><text:span text:style-name="T21">U</text:span></text:span><text:span text:style-name="Strong_20_Emphasis"><text:span text:style-name="T20">nterstützung, sowie an Herrn Adamek für seine Unterstützung in der Kommunikation mit Frau Neumann.</text:span></text:span></text:p>
        </text:list-item>
        <text:list-item>
          <text:p text:style-name="P8"><text:span text:style-name="Strong_20_Emphasis"><text:span text:style-name="T5">Standbericht</text:span></text:span></text:p>
          <text:list>
            <text:list-item>
              <text:p text:style-name="P7"><text:span text:style-name="Strong_20_Emphasis"><text:span text:style-name="T5">Status Fenstertausch</text:span></text:span><text:span text:style-name="Strong_20_Emphasis"><text:span text:style-name="T11">: Sind alle Fenster ausgetausch</text:span></text:span><text:span text:style-name="Strong_20_Emphasis"><text:span text:style-name="T19">t</text:span></text:span><text:span text:style-name="Strong_20_Emphasis"><text:span text:style-name="T11">, </text:span></text:span><text:span text:style-name="Strong_20_Emphasis"><text:span text:style-name="T19">sind alle mit den Arbeitsergebnissen zufrieden, </text:span></text:span><text:span text:style-name="Strong_20_Emphasis"><text:span text:style-name="T11">welches Vorgehen bezüglich der Rollokästen </text:span></text:span><text:span text:style-name="Strong_20_Emphasis"><text:span text:style-name="T12">und sonstigen Endarbeiten</text:span></text:span><text:span text:style-name="Strong_20_Emphasis"><text:span text:style-name="T11"> </text:span></text:span><text:span text:style-name="Strong_20_Emphasis"><text:span text:style-name="T12">Innen</text:span></text:span><text:span text:style-name="Strong_20_Emphasis"><text:span text:style-name="T13">raum</text:span></text:span><text:span text:style-name="Strong_20_Emphasis"><text:span text:style-name="T12"> </text:span></text:span><text:span text:style-name="Strong_20_Emphasis"><text:span text:style-name="T11">(Selbstzahlen oder zumindest gemeinsame Firma mit angeboten einholen). </text:span></text:span><text:span text:style-name="Strong_20_Emphasis"><text:span text:style-name="T20">Mit Beitrag von Herrn Adamek zu den Balkongittern</text:span></text:span></text:p>
            </text:list-item>
            <text:list-item>
              <text:p text:style-name="P7"><text:span text:style-name="Strong_20_Emphasis"><text:span text:style-name="T6">F</text:span></text:span><text:span text:style-name="Strong_20_Emphasis"><text:span text:style-name="T5">assade</text:span></text:span><text:span text:style-name="Strong_20_Emphasis"><text:span text:style-name="T11">: Wie sollen die übrigen Schäden an der Fassade ausgebessert werden? Evtl. An</text:span></text:span><text:span text:style-name="Strong_20_Emphasis"><text:span text:style-name="T19">ge</text:span></text:span><text:span text:style-name="Strong_20_Emphasis"><text:span text:style-name="T11">bote einholen oder wieder jeder selbst zahlen.</text:span></text:span></text:p>
            </text:list-item>
          </text:list>
        </text:list-item>
      </text:list>
      <text:list text:style-name="L2">
        <text:list-item>
          <text:list>
            <text:list-item>
              <text:p text:style-name="P13"><text:span text:style-name="T4">Sanierungsbonus.</text:span><text:span text:style-name="T13"> </text:span><text:span text:style-name="Strong_20_Emphasis"><text:span text:style-name="T10">Die Einreichfrist für Anträge der Förderperiode 2025 endete am 28. Februar 2026. </text:span></text:span><text:span text:style-name="Strong_20_Emphasis"><text:span text:style-name="T11">Seria hat kein Antrag für einen <text:s/>Zuschuss eingebracht kann dies nachgeholt werden, wenn ja wann </text:span></text:span><text:span text:style-name="Strong_20_Emphasis"><text:span text:style-name="T13">wie. Bis dato keine Auskunft von Frau Neumann – Herr Simbürger könnte gegen einen Aufpreis von 500 Euro für uns eine Einreichung im nächsten Quartal durchführen oder <text:s/>zumindest die Rechnung passend Datieren. </text:span></text:span><text:span text:style-name="Strong_20_Emphasis"><text:span text:style-name="T15">Pflichtvernachlässigungsklage/Schadensersatzklage 35% Förderung.</text:span></text:span></text:p>
            </text:list-item>
          </text:list>
        </text:list-item>
      </text:list>
      <text:list text:style-name="L4">
        <text:list-item>
          <text:list>
            <text:list-item>
              <text:p text:style-name="P16"><text:span text:style-name="Strong_20_Emphasis"><text:span text:style-name="T5">Handwerkerbonus</text:span></text:span><text:span text:style-name="Strong_20_Emphasis"><text:span text:style-name="T11"> - </text:span></text:span><text:span text:style-name="Strong_20_Emphasis"><text:span text:style-name="T15">Die Einreichfrist für Anträge der Förderperiode 2025 endete am 28. Februar 2026. </text:span></text:span></text:p>
            </text:list-item>
          </text:list>
        </text:list-item>
      </text:list>
      <text:list xml:id="list161442007865428" text:continue-list="list3337907078" text:style-name="L1">
        <text:list-item>
          <text:list>
            <text:list-item>
              <text:p text:style-name="P10"><text:span text:style-name="Strong_20_Emphasis"><text:span text:style-name="T5">Status Quo Seria </text:span></text:span><text:span text:style-name="Strong_20_Emphasis"><text:span text:style-name="T11">– </text:span></text:span><text:span text:style-name="Strong_20_Emphasis"><text:span text:style-name="T13">Weiterhin keine Auskunft, kein Entgegenkommen, nicht erledigen der Pflichten bzw. Ignorieren unserer Anliegen und Aufträge.</text:span></text:span></text:p>
            </text:list-item>
            <text:list-item>
              <text:p text:style-name="P10"><text:span text:style-name="Strong_20_Emphasis"><text:span text:style-name="T6">HV Alternativen: </text:span></text:span><text:span text:style-name="Strong_20_Emphasis"><text:span text:style-name="T11">Anbote der Firma Wesiak und Rustler </text:span></text:span><text:span text:style-name="Strong_20_Emphasis"><text:span text:style-name="T13">~ 1000 euro um</text:span></text:span></text:p>
            </text:list-item>
          </text:list>
        </text:list-item>
      </text:list>
      <text:list text:style-name="L3">
        <text:list-item>
          <text:list>
            <text:list-item>
              <text:p text:style-name="P14"><text:span text:style-name="Strong_20_Emphasis"><text:span text:style-name="T14">Zählerpunkt</text:span></text:span><text:span text:style-name="Strong_20_Emphasis"><text:span text:style-name="T15">e</text:span></text:span><text:span text:style-name="Strong_20_Emphasis"><text:span text:style-name="T14"> </text:span></text:span><text:span text:style-name="Strong_20_Emphasis"><text:span text:style-name="T16">A</text:span></text:span><text:span text:style-name="Strong_20_Emphasis"><text:span text:style-name="T14">bschaltung des Nachtstroms? </text:span></text:span><text:span text:style-name="Strong_20_Emphasis"><text:span text:style-name="T15">(Elektro Schröttner ~80 Euro pro Umstellung)</text:span></text:span></text:p>
            </text:list-item>
          </text:list>
        </text:list-item>
      </text:list>
      <text:list text:continue-list="list161442007865428" text:style-name="L1">
        <text:list-item>
          <text:list>
            <text:list-item>
              <text:p text:style-name="P7"><text:span text:style-name="Strong_20_Emphasis"><text:span text:style-name="T5">Fichtenschnitt: </text:span></text:span><text:span text:style-name="Strong_20_Emphasis"><text:span text:style-name="T11">Angebote </text:span></text:span><text:span text:style-name="Strong_20_Emphasis"><text:span text:style-name="T21">S</text:span></text:span><text:span text:style-name="Strong_20_Emphasis"><text:span text:style-name="T11">tatus?</text:span></text:span></text:p>
            </text:list-item>
            <text:list-item>
              <text:p text:style-name="P9"><text:span text:style-name="Strong_20_Emphasis"><text:span text:style-name="T6">Gartenweg:</text:span></text:span><text:span text:style-name="Strong_20_Emphasis"><text:span text:style-name="T15"> </text:span></text:span><text:span text:style-name="Strong_20_Emphasis"><text:span text:style-name="T17">Weg in den Garten befestigen (Adamek)?</text:span></text:span></text:p>
            </text:list-item>
            <text:list-item>
              <text:p text:style-name="P9"><text:span text:style-name="Strong_20_Emphasis"><text:span text:style-name="T7">Fahrradständer </text:span></text:span><text:span text:style-name="Strong_20_Emphasis"><text:span text:style-name="T17">(Dietlinde – </text:span></text:span><text:span text:style-name="Strong_20_Emphasis"><text:span text:style-name="T13">nächtliches </text:span></text:span><text:span text:style-name="Strong_20_Emphasis"><text:span text:style-name="T21">K</text:span></text:span><text:span text:style-name="Strong_20_Emphasis"><text:span text:style-name="T13">lopfen</text:span></text:span><text:span text:style-name="Strong_20_Emphasis"><text:span text:style-name="T17">)</text:span></text:span></text:p>
            </text:list-item>
            <text:list-item>
              <text:p text:style-name="P9"><text:span text:style-name="Strong_20_Emphasis"><text:span text:style-name="T29">Belästigung</text:span></text:span><text:span text:style-name="Strong_20_Emphasis"><text:span text:style-name="T26"> und Optik </text:span></text:span><text:span text:style-name="Strong_20_Emphasis"><text:span text:style-name="T27">Balkon</text:span></text:span><text:span text:style-name="Strong_20_Emphasis"><text:span text:style-name="T26"> WHG </text:span></text:span><text:span text:style-name="Strong_20_Emphasis"><text:span text:style-name="T28">1</text:span></text:span><text:span text:style-name="Strong_20_Emphasis"><text:span text:style-name="T17"> </text:span></text:span><text:span text:style-name="Strong_20_Emphasis"><text:span text:style-name="T13">wurde beklagt</text:span></text:span><text:span text:style-name="Strong_20_Emphasis"><text:span text:style-name="T17">.</text:span></text:span></text:p>
            </text:list-item>
            <text:list-item>
              <text:p text:style-name="P11"><text:span text:style-name="Strong_20_Emphasis"><text:span text:style-name="T9">Entsorgung Sperrmüll Keller:</text:span></text:span><text:span text:style-name="Strong_20_Emphasis"><text:span text:style-name="T21"> </text:span></text:span><text:span text:style-name="Strong_20_Emphasis"><text:span text:style-name="T15">Matratze Allgemein-Keller bitte entsorgen aus Hygenischen Gründen – Hanta Virus</text:span></text:span></text:p>
            </text:list-item>
          </text:list>
        </text:list-item>
      </text:list>
      <text:p text:style-name="P15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3"><text:span text:style-name="Strong_20_Emphasis"><text:span text:style-name="T18">Anhang Gegenüberstellung der Angeboten Rustler/Wesiak</text:span>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1:06:39.849507691</meta:creation-date>
    <dc:date>2026-03-27T16:14:25.664485250</dc:date>
    <meta:editing-duration>PT51M29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290" meta:character-count="2138" meta:non-whitespace-character-count="1874"/>
  </office:meta>
</office:document-meta>
</file>